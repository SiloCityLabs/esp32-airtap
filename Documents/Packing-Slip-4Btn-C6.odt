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c1a" officeooo:paragraph-rsid="0022b606"/>
    </style:style>
    <style:style style:name="P2" style:family="paragraph" style:parent-style-name="Standard">
      <style:text-properties officeooo:rsid="0021d128" officeooo:paragraph-rsid="0022b606"/>
    </style:style>
    <style:style style:name="P3" style:family="paragraph" style:parent-style-name="Standard">
      <style:text-properties officeooo:rsid="0021d128" officeooo:paragraph-rsid="0022d4c0"/>
    </style:style>
    <style:style style:name="P4" style:family="paragraph" style:parent-style-name="Standard">
      <style:text-properties officeooo:rsid="0021d128" officeooo:paragraph-rsid="0022d4c0"/>
    </style:style>
    <style:style style:name="P5" style:family="paragraph" style:parent-style-name="Standard">
      <style:text-properties officeooo:rsid="0021d128" officeooo:paragraph-rsid="002486b8"/>
    </style:style>
    <style:style style:name="P6" style:family="paragraph" style:parent-style-name="Standard">
      <style:text-properties officeooo:rsid="0021d128" officeooo:paragraph-rsid="00282872"/>
    </style:style>
    <style:style style:name="P7" style:family="paragraph" style:parent-style-name="Standard">
      <style:text-properties officeooo:rsid="001d1c1a" officeooo:paragraph-rsid="00282872"/>
    </style:style>
    <style:style style:name="T1" style:family="text">
      <style:text-properties officeooo:rsid="001ed6a9"/>
    </style:style>
    <style:style style:name="T2" style:family="text">
      <style:text-properties officeooo:rsid="0022b606"/>
    </style:style>
    <style:style style:name="T3" style:family="text">
      <style:text-properties officeooo:rsid="0022d4c0"/>
    </style:style>
    <style:style style:name="T4" style:family="text">
      <style:text-properties fo:font-weight="bold" style:font-weight-asian="bold" style:font-weight-complex="bold"/>
    </style:style>
    <style:style style:name="T5" style:family="text">
      <style:text-properties officeooo:rsid="002486b8"/>
    </style:style>
    <style:style style:name="T6" style:family="text">
      <style:text-properties officeooo:rsid="002654f6"/>
    </style:style>
    <style:style style:name="T7" style:family="text">
      <style:text-properties officeooo:rsid="002828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nk you for purchasing the Airtap ESP32-C6 4 Button Variant. This device comes preflash<text:span text:style-name="T1">ed</text:span> with esphome firmware. Open the home assistant iphone/android app and discover devices should show the device. In addition to the device <text:span text:style-name="T4">two display brackets</text:span> were included. One black and one white, <text:span text:style-name="T4">chose one</text:span>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1"/>
      <text:p text:style-name="P1"/>
      <text:p text:style-name="P3">QA Checklist:</text:p>
      <text:p text:style-name="P3"/>
      <text:p text:style-name="P3">____ : <text:span text:style-name="T3">Solder Mask Stencil</text:span></text:p>
      <text:p text:style-name="P3"/>
      <text:p text:style-name="P3"><text:tab/>____ : <text:span text:style-name="T3">21x 10k resistors (Full Panel)</text:span></text:p>
      <text:p text:style-name="P3"/>
      <text:p text:style-name="P3"><text:tab/>____ : <text:span text:style-name="T3">21x </text:span><text:span text:style-name="T6">0.1uF </text:span><text:span text:style-name="T3">Capacitors (Full Panel)</text:span></text:p>
      <text:p text:style-name="P3"/>
      <text:p text:style-name="P3"><text:tab/>____ : <text:span text:style-name="T3">AMS1117-3.3 Regulator</text:span></text:p>
      <text:p text:style-name="P3"/>
      <text:p text:style-name="P3"><text:tab/>____ : <text:span text:style-name="T3">ESP32 C6</text:span></text:p>
      <text:p text:style-name="P3"/>
      <text:p text:style-name="P3"><text:tab/>____ : <text:span text:style-name="T3">BSS138 Transistor</text:span></text:p>
      <text:p text:style-name="P3"/>
      <text:p text:style-name="P5">____ : Solder JST-3P x2, JST-2P <text:span text:style-name="T3">x2</text:span></text:p>
      <text:p text:style-name="P5"/>
      <text:p text:style-name="P5">____ : Solder <text:span text:style-name="T5">4</text:span> Buttons <text:span text:style-name="T5">5.2x5.2.x1.5mm</text:span></text:p>
      <text:p text:style-name="P3"/>
      <text:p text:style-name="P3">____ : Solder 470uF <text:span text:style-name="T3">16v</text:span></text:p>
      <text:p text:style-name="P3"/>
      <text:p text:style-name="P3">____ : Solder OLED <text:span text:style-name="T3">+ Bracket </text:span><text:span text:style-name="T5">(remove header block)</text:span></text:p>
      <text:p text:style-name="P2"/>
      <text:p text:style-name="P2">____ : Attach Antenna</text:p>
      <text:p text:style-name="P2"/>
      <text:p text:style-name="P3">____ : Flash Firmware &amp; Test</text:p>
      <text:p text:style-name="P3"/>
      <text:p text:style-name="P3">____ : Box up brackets</text:p>
      <text:p text:style-name="P3"/>
      <text:p text:style-name="P3">____ : Packing Slips</text:p>
      <text:p text:style-name="P3"/>
      <text:p text:style-name="P3">____ : Box up PCB <text:span text:style-name="T3">+ Checklist</text:span></text:p>
      <text:p text:style-name="P3"/>
      <text:p text:style-name="P7"/>
      <text:p text:style-name="P6"><text:span text:style-name="T7">Customer</text:span> Checklist:</text:p>
      <text:p text:style-name="P6"/>
      <text:p text:style-name="P6">____ : <text:span text:style-name="T7">Remove OLED Film</text:span></text:p>
      <text:p text:style-name="P6"/>
      <text:p text:style-name="P6">____ : <text:span text:style-name="T7">Connect By USB and Connect in HA APP</text:span></text:p>
      <text:p text:style-name="P6"/>
      <text:p text:style-name="P6">____ : <text:span text:style-name="T7">Install Unit with Guide (</text:span><text:span text:style-name="T2">https://silocitylabs.com/post/2026/airtap-esp32-gen2-instructions</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21:32:57.714879022</meta:creation-date>
    <dc:date>2026-07-06T07:11:00.591950895</dc:date>
    <meta:editing-duration>PT46M45S</meta:editing-duration>
    <meta:editing-cycles>11</meta:editing-cycles>
    <meta:generator>LibreOffice/24.2.7.2$Linux_X86_64 LibreOffice_project/420$Build-2</meta:generator>
    <meta:print-date>2026-07-06T04:36:56.682295884</meta:print-date>
    <meta:document-statistic meta:table-count="0" meta:image-count="0" meta:object-count="0" meta:page-count="1" meta:paragraph-count="21" meta:word-count="194" meta:character-count="1156" meta:non-whitespace-character-count="978"/>
  </office:meta>
</office:document-meta>
</file>