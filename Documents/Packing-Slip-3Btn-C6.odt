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1c1a" officeooo:paragraph-rsid="001d1c1a"/>
    </style:style>
    <style:style style:name="P2" style:family="paragraph" style:parent-style-name="Standard">
      <style:text-properties officeooo:rsid="001d1c1a" officeooo:paragraph-rsid="0021d128"/>
    </style:style>
    <style:style style:name="P3" style:family="paragraph" style:parent-style-name="Standard">
      <style:text-properties officeooo:rsid="0021d128" officeooo:paragraph-rsid="0021d128"/>
    </style:style>
    <style:style style:name="P4" style:family="paragraph" style:parent-style-name="Standard">
      <style:text-properties officeooo:rsid="0021d128" officeooo:paragraph-rsid="0023ee4f"/>
    </style:style>
    <style:style style:name="P5" style:family="paragraph" style:parent-style-name="Standard">
      <style:text-properties officeooo:rsid="0021d128" officeooo:paragraph-rsid="002493a0"/>
    </style:style>
    <style:style style:name="T1" style:family="text">
      <style:text-properties officeooo:rsid="001ed6a9"/>
    </style:style>
    <style:style style:name="T2" style:family="text">
      <style:text-properties officeooo:rsid="0021d128"/>
    </style:style>
    <style:style style:name="T3" style:family="text">
      <style:text-properties fo:font-weight="bold" style:font-weight-asian="bold" style:font-weight-complex="bold"/>
    </style:style>
    <style:style style:name="T4" style:family="text">
      <style:text-properties officeooo:rsid="0023ee4f"/>
    </style:style>
    <style:style style:name="T5" style:family="text">
      <style:text-properties officeooo:rsid="002493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ank you for purchasing the Airtap ESP32-C6 <text:span text:style-name="T2">3</text:span> Button Variant. This device comes preflash<text:span text:style-name="T1">ed</text:span> with esphome firmware. Open the home assistant iphone/android app and discover devices should show the device. In addition to the device <text:span text:style-name="T3">two display brackets</text:span> were included. One black and one white, <text:span text:style-name="T3">chose one that matches your aesthetic</text:span>. One optional antenna has been included for future Zigbee firmware support. You may install or leave it as is. If you have any questions feel free to reach out to us at <text:a xlink:type="simple" xlink:href="mailto:orders@silocitylabs.com" text:style-name="Internet_20_link" text:visited-style-name="Visited_20_Internet_20_Link">orders@silocitylabs.com</text:a></text:p>
      <text:p text:style-name="P1"/>
      <text:p text:style-name="P1"/>
      <text:p text:style-name="P4">QA Checklist:</text:p>
      <text:p text:style-name="P4"/>
      <text:p text:style-name="P4">____ : Solder OLED side with 3 Buttons 6x6x9</text:p>
      <text:p text:style-name="P4"/>
      <text:p text:style-name="P4">____ : Solder OLED Side ESP32</text:p>
      <text:p text:style-name="P4"/>
      <text:p text:style-name="P4">____ : Solder Connector side, JST-3P x2, JST-2P, KF-128, 470uF</text:p>
      <text:p text:style-name="P4"/>
      <text:p text:style-name="P5">____ : Attach Antenna</text:p>
      <text:p text:style-name="P5"/>
      <text:p text:style-name="P5">____ : <text:span text:style-name="T5">Optional MP2307 + IN5819 Diode on Pin 3 to Inductor</text:span></text:p>
      <text:p text:style-name="P4"/>
      <text:p text:style-name="P4">____ : Flash Firmware &amp; Test</text:p>
      <text:p text:style-name="P4"/>
      <text:p text:style-name="P4">____ : Box up brackets + PCB</text:p>
      <text:p text:style-name="P4"/>
      <text:p text:style-name="P4">____ : Packing Slips</text:p>
      <text:p text:style-name="P3"/>
      <text:p text:style-name="P3"/>
      <text:p text:style-name="P2">Thank you for purchasing the Airtap ESP32-C6 <text:span text:style-name="T2">3</text:span> Button Variant. This device comes preflash<text:span text:style-name="T1">ed</text:span> with esphome firmware. Open the home assistant iphone/android app and discover devices should show the device. In addition to the device <text:span text:style-name="T3">two display brackets</text:span> were included. One black and one white, <text:span text:style-name="T3">chose one that matches your aesthetic</text:span>. One optional antenna has been included for future Zigbee firmware support. You may install or leave it as is. If you have any questions feel free to reach out to us at <text:a xlink:type="simple" xlink:href="mailto:orders@silocitylabs.com" text:style-name="Internet_20_link" text:visited-style-name="Visited_20_Internet_20_Link">orders@silocitylabs.com</text:a></text:p>
      <text:p text:style-name="P2"/>
      <text:p text:style-name="P2"/>
      <text:p text:style-name="P3">QA Checklist:</text:p>
      <text:p text:style-name="P3"/>
      <text:p text:style-name="P3">____ : Solder OLED side with 3 Buttons 6x6x9</text:p>
      <text:p text:style-name="P3"/>
      <text:p text:style-name="P3">____ : Solder OLED Side ESP32</text:p>
      <text:p text:style-name="P3"/>
      <text:p text:style-name="P3">____ : Solder Connector side, JST-3P x2, JST-2P, KF-128, 470uF</text:p>
      <text:p text:style-name="P3"/>
      <text:p text:style-name="P5">____ : Attach Antenna</text:p>
      <text:p text:style-name="P5"/>
      <text:p text:style-name="P5">____ : <text:span text:style-name="T5">Optional MP2307 + IN5819 Diode on Pin 3 to Inductor</text:span></text:p>
      <text:p text:style-name="P3"/>
      <text:p text:style-name="P3">____ : Flash Firmware &amp; Test</text:p>
      <text:p text:style-name="P3"/>
      <text:p text:style-name="P3">____ : Box up brackets + PCB</text:p>
      <text:p text:style-name="P3"/>
      <text:p text:style-name="P3">____ : Packing Slip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8T21:32:57.714879022</meta:creation-date>
    <dc:date>2026-07-06T04:27:44.419927946</dc:date>
    <meta:editing-duration>PT42M10S</meta:editing-duration>
    <meta:editing-cycles>8</meta:editing-cycles>
    <meta:generator>LibreOffice/24.2.7.2$Linux_X86_64 LibreOffice_project/420$Build-2</meta:generator>
    <meta:print-date>2026-01-22T11:24:21.579307423</meta:print-date>
    <meta:document-statistic meta:table-count="0" meta:image-count="0" meta:object-count="0" meta:page-count="1" meta:paragraph-count="20" meta:word-count="288" meta:character-count="1646" meta:non-whitespace-character-count="1378"/>
  </office:meta>
</office:document-meta>
</file>